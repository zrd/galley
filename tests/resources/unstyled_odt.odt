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-INF/manifes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fo="urn:oasis:names:tc:opendocument:xmlns:xsl-fo-compatible:1.0" xmlns:style="urn:oasis:names:tc:opendocument:xmlns:style:1.0" office:version="1.3">
  <office:automatic-styles>
    <style:style style:name="BigBold" style:family="paragraph">
      <style:text-properties fo:font-size="18pt" fo:font-weight="bold"/>
    </style:style>
    <style:style style:name="Normal" style:family="paragraph">
      <style:text-properties fo:font-size="12pt"/>
    </style:style>
  </office:automatic-styles>
  <office:body>
    <office:text>
      <text:p text:style-name="BigBold">Part One: The Beginning</text:p>
      <text:p text:style-name="Normal">In our first paragraph, we’ll begin.</text:p>
      <text:p text:style-name="Normal">The second paragraph contains visually bold and italic text, but uses no semantic character styles that pandoc recognizes.</text:p>
      <text:p text:style-name="Normal">A third paragraph, for completeness.</text:p>
      <text:p text:style-name="BigBold">Part Two: The Continuation</text:p>
      <text:p text:style-name="Normal">The second section exists to confirm that pandoc does not recover structure from visual formatting al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3">
  <office:styles>
    <style:default-style style:family="paragraph">
      <style:text-properties fo:font-size="12pt" fo:font-family="Liberation Serif"/>
    </style:default-style>
  </office:styles>
</office:document-styles>
</file>